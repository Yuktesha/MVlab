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ngLiU" svg:font-family="MingLiU" style:font-family-generic="modern" style:font-pitch="fixed"/>
    <style:font-face style:name="OpenSymbol" svg:font-family="OpenSymbol" style:font-charset="x-symbol"/>
    <style:font-face style:name="Source Han Sans TC" svg:font-family="'Source Han Sans TC'" style:font-family-generic="system" style:font-pitch="variable"/>
    <style:font-face style:name="Source Han Serif TC" svg:font-family="'Source Han Serif TC'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paragraph-rsid="002dc06a"/>
    </style:style>
    <style:style style:name="P4" style:family="paragraph" style:parent-style-name="Text_20_body">
      <style:text-properties officeooo:paragraph-rsid="0030652d"/>
    </style:style>
    <style:style style:name="P5" style:family="paragraph" style:parent-style-name="Text_20_body">
      <style:text-properties officeooo:paragraph-rsid="002d6705"/>
    </style:style>
    <style:style style:name="P6" style:family="paragraph" style:parent-style-name="Text_20_body">
      <style:text-properties officeooo:paragraph-rsid="0033bb85"/>
    </style:style>
    <style:style style:name="P7" style:family="paragraph" style:parent-style-name="Text_20_body" style:list-style-name="L2">
      <style:text-properties officeooo:paragraph-rsid="003b6b35"/>
    </style:style>
    <style:style style:name="P8" style:family="paragraph" style:parent-style-name="Text_20_body" style:list-style-name="L2"/>
    <style:style style:name="T1" style:family="text">
      <style:text-properties fo:color="#ffffff" loext:opacity="100%" fo:font-family="Consolas" style:font-family-generic="roman" style:font-pitch="variable" fo:font-size="16pt" style:font-size-asian="16pt"/>
    </style:style>
    <style:style style:name="T2" style:family="text">
      <style:text-properties officeooo:rsid="003c8420"/>
    </style:style>
    <style:style style:name="T3" style:family="text">
      <style:text-properties officeooo:rsid="0030652d"/>
    </style:style>
    <style:style style:name="T4" style:family="text">
      <style:text-properties officeooo:rsid="002e994f"/>
    </style:style>
    <style:style style:name="T5" style:family="text">
      <style:text-properties officeooo:rsid="002d6705"/>
    </style:style>
    <style:style style:name="T6" style:family="text">
      <style:text-properties officeooo:rsid="0020b340"/>
    </style:style>
    <style:style style:name="T7" style:family="text">
      <style:text-properties officeooo:rsid="0033bb8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LG (Play List Generator)</text:p>
      <text:h text:style-name="P1" text:outline-level="3">一個命令列為主、GUI為輔的播放清單生成器</text:h>
      <text:h text:style-name="Heading_20_1" text:outline-level="1">基本行為：</text:h>
      <text:list text:style-name="L1">
        <text:list-item>
          <text:p text:style-name="P2">無參數時啟動GUI介面<text:span text:style-name="T1"/></text:p>
        </text:list-item>
        <text:list-item>
          <text:p text:style-name="P2">有參數且含參數 /G 時，以GUI介面帶進成果給使用者確認<text:span text:style-name="T1"/></text:p>
        </text:list-item>
        <text:list-item>
          <text:p text:style-name="P3">有參數但無參數 /G 時，以參數生成指定格式播放清單</text:p>
        </text:list-item>
        <text:list-item>
          <text:p text:style-name="P3">未指定播放清單格式時，預設為 xspf 格式。</text:p>
        </text:list-item>
      </text:list>
      <text:h text:style-name="Heading_20_1" text:outline-level="1">命令基本語法：</text:h>
      <text:p text:style-name="P4">pl<text:span text:style-name="T2">g</text:span> (Source)[drive:][path] [file type] [/S] [/O[[:]sortorder]] (Target)[drive:][path][filename] [/F[[:]fileformat]] [/B] <text:span text:style-name="T3">[/L[:]hh:mm:ss,容許誤差範圍+/-hh:mm:ss] [/N[:]歌曲數量N,容許誤差範圍+/-n] </text:span><text:span text:style-name="T4">[/U]</text:span></text:p>
      <text:p text:style-name="Text_20_body"/>
      <text:p text:style-name="Text_20_body">/O <text:s/>List by files in sorted order.<text:span text:style-name="T1"/></text:p>
      <text:p text:style-name="Text_20_body"><text:tab/>Sortorder<text:span text:style-name="T1"/></text:p>
      <text:p text:style-name="Text_20_body"><text:tab/><text:tab/>N <text:s/>By file name (alphabetic)</text:p>
      <text:p text:style-name="Text_20_body"><text:tab/><text:tab/>S <text:s/>By file size (smallest first)</text:p>
      <text:p text:style-name="Text_20_body"><text:tab/><text:tab/>E <text:s/>By file extension (alphabetic)</text:p>
      <text:p text:style-name="Text_20_body"><text:tab/><text:tab/>D <text:s/>By file date/time (newest first)</text:p>
      <text:p text:style-name="Text_20_body"><text:tab/><text:tab/>G <text:s/>Group directories first</text:p>
      <text:p text:style-name="Text_20_body"><text:tab/><text:tab/>A <text:s/>By artist</text:p>
      <text:p text:style-name="Text_20_body"><text:tab/><text:tab/>TT By title</text:p>
      <text:p text:style-name="Text_20_body"><text:tab/><text:tab/>TK By track name</text:p>
      <text:p text:style-name="Text_20_body"><text:tab/><text:tab/>TN By track number</text:p>
      <text:p text:style-name="Text_20_body"><text:tab/><text:tab/>- <text:s/>Prefix to reverse order</text:p>
      <text:p text:style-name="Text_20_body"/>
      <text:p text:style-name="Text_20_body">/S <text:s/><text:span text:style-name="T5">I</text:span><text:span text:style-name="T6">nclude</text:span> subdirectories.</text:p>
      <text:p text:style-name="Text_20_body"/>
      <text:p text:style-name="Text_20_body">/B <text:s/>如檔案格式支援，以命令被啟動的資料夾中的媒體檔案之相對路徑生成播放清單內容。未使用本參數時，預設為完整路徑。</text:p>
      <text:p text:style-name="Text_20_body"/>
      <text:p text:style-name="Text_20_body">/F <text:s/>支援M3U8、<text:span text:style-name="T5">PLS、XSPF、WPL</text:span></text:p>
      <text:p text:style-name="P5">/<text:span text:style-name="T3">L <text:s/></text:span>指定總長度及容許誤差範圍</text:p>
      <text:p text:style-name="P6"><text:soft-page-break/>/<text:span text:style-name="T7">N <text:s/>指定播放媒體總</text:span>數量及容許誤差範圍</text:p>
      <text:p text:style-name="P5">/U <text:s/>依啟動資料夾中所有播放清單中備註所用參數更新清單</text:p>
      <text:p text:style-name="P5"/>
      <text:p text:style-name="Text_20_body">當同時指定 <text:span text:style-name="Source_20_Text">/F</text:span>（指定格式）與 <text:span text:style-name="Source_20_Text">/L</text:span>（總長度限制）參數，且來源媒體檔案總量足以實作為多組播放清單時，程式應自動啟用<text:span text:style-name="Strong_20_Emphasis">多組切分模式</text:span>。</text:p>
      <text:list text:style-name="L2">
        <text:list-item>
          <text:list>
            <text:list-item>
              <text:p text:style-name="P7"><text:span text:style-name="Strong_20_Emphasis">命名規則</text:span>：自動以使用者指定的目標檔名後方附加 <text:span text:style-name="Source_20_Text">[-NNN]</text:span> 流水號形式生成（例如：<text:span text:style-name="Source_20_Text">折返點[-001].xspf</text:span>、<text:span text:style-name="Source_20_Text">折返點[-002].xspf</text:span>。</text:p>
            </text:list-item>
            <text:list-item>
              <text:p text:style-name="P8"><text:span text:style-name="Strong_20_Emphasis">去重機制</text:span>：已被選入前一張清單的檔案，不得重複出現在後續的清單中，確保每組清單內容完全不同。</text:p>
            </text:list-item>
            <text:list-item>
              <text:p text:style-name="P7"><text:span text:style-name="Strong_20_Emphasis">殘餘處理</text:span>：若最後剩餘的檔案總長度不足 <text:span text:style-name="Source_20_Text">/L</text:span> 的誤差範圍，仍應將剩餘檔案生成最後一組清單，不予捨棄。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ngLiU" svg:font-family="MingLiU" style:font-family-generic="modern" style:font-pitch="fixed"/>
    <style:font-face style:name="OpenSymbol" svg:font-family="OpenSymbol" style:font-charset="x-symbol"/>
    <style:font-face style:name="Source Han Sans TC" svg:font-family="'Source Han Sans TC'" style:font-family-generic="system" style:font-pitch="variable"/>
    <style:font-face style:name="Source Han Serif TC" svg:font-family="'Source Han Serif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erif TC" style:font-size-asian="10.5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Source Han Serif TC" style:font-size-asian="10.5pt" style:language-asian="zh" style:country-asian="TW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TC" style:font-family-asian="'Source Han Sans T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ingLiU" style:font-family-asian="MingLiU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ListLabel_20_2" loext:num-list-format="·" style:num-suffix="·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0T23:49:49.272170400</meta:creation-date>
    <meta:editing-duration>PT46M8S</meta:editing-duration>
    <meta:editing-cycles>35</meta:editing-cycles>
    <meta:generator>LibreOffice/26.2.1.2$Windows_X86_64 LibreOffice_project/620$Build-2</meta:generator>
    <dc:title>巴巴法語</dc:title>
    <dc:date>2026-06-11T00:47:43.190365700</dc:date>
    <meta:print-date>2026-06-11T00:21:58.031803500</meta:print-date>
    <meta:printed-by>PDF 檔案</meta:printed-by>
    <meta:document-statistic meta:table-count="0" meta:image-count="0" meta:object-count="0" meta:page-count="2" meta:paragraph-count="31" meta:word-count="518" meta:character-count="1039" meta:non-whitespace-character-count="930"/>
    <meta:template xlink:type="simple" xlink:actuate="onRequest" xlink:title="巴巴法語" xlink:href="../../../../Users/Yuktesha/AppData/Roaming/LibreOffice/4/user/template/巴巴法語1.ott" meta:date="2026-06-10T23:49:48.916586000"/>
  </office:meta>
</office:document-meta>
</file>